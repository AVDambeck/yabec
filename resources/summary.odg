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50000007EEFA02AAB.png" manifest:media-type="image/png"/>
  <manifest:file-entry manifest:full-path="Pictures/10000001000000650000007E496632EC.png" manifest:media-type="image/png"/>
  <manifest:file-entry manifest:full-path="Pictures/10000001000000650000007EF25DE3A7.png" manifest:media-type="image/png"/>
  <manifest:file-entry manifest:full-path="Pictures/1000033900000A7000000D06DC9E3C64.svg" manifest:media-type="image/svg+xml"/>
  <manifest:file-entry manifest:full-path="Pictures/10000001000000650000007E55B32220.png" manifest:media-type="image/png"/>
  <manifest:file-entry manifest:full-path="Pictures/100006D000000A7000000D0660D37332.svg" manifest:media-type="image/svg+xml"/>
  <manifest:file-entry manifest:full-path="Pictures/10000001000000650000007EEA75F999.png" manifest:media-type="image/png"/>
  <manifest:file-entry manifest:full-path="Pictures/100005AD00000A7000000D0669AB4ADA.svg" manifest:media-type="image/svg+xml"/>
  <manifest:file-entry manifest:full-path="Pictures/1000059E00000A7000000D06896E62DB.svg" manifest:media-type="image/svg+xml"/>
  <manifest:file-entry manifest:full-path="Pictures/10000001000000650000007E3BA6803A.png" manifest:media-type="image/png"/>
  <manifest:file-entry manifest:full-path="Pictures/1000061800000A7000000D06721052B5.svg" manifest:media-type="image/svg+xml"/>
  <manifest:file-entry manifest:full-path="Pictures/1000070000000A7000000D06F9745173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 Goblin Appears!" svg:font-family="'A Goblin Appears!'" style:font-adornments="Regular" style:font-pitch="variable"/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Title_20_A4">
      <style:graphic-properties draw:textarea-horizontal-align="right" draw:auto-grow-height="true" draw:auto-grow-width="false" fo:min-height="1.588cm" fo:min-width="0cm" loext:decorative="false"/>
      <style:paragraph-properties style:writing-mode="lr-tb"/>
    </style:style>
    <style:style style:name="gr2" style:family="graphic" style:parent-style-name="note">
      <style:graphic-properties draw:textarea-horizontal-align="left" draw:auto-grow-height="true" draw:auto-grow-width="true" fo:min-height="0.285cm" fo:min-width="6.644cm" loext:decorative="false"/>
      <style:paragraph-properties style:writing-mode="lr-tb"/>
    </style:style>
    <style:style style:name="gr3" style:family="graphic" style:parent-style-name="Heading_20_A4">
      <style:graphic-properties draw:textarea-horizontal-align="left" draw:auto-grow-height="true" draw:auto-grow-width="true" fo:min-height="0.556cm" fo:min-width="5.12cm" loext:decorative="false"/>
      <style:paragraph-properties style:writing-mode="lr-tb"/>
    </style:style>
    <style:style style:name="gr4" style:family="graphic" style:parent-style-name="Text_20_A4">
      <style:graphic-properties draw:textarea-horizontal-align="left" draw:auto-grow-height="true" draw:auto-grow-width="true" fo:min-height="0.556cm" fo:min-width="6.192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52cm, 0cm)" draw:image-opacity="100%" style:mirror="none" loext:decorative="false"/>
    </style:style>
    <style:style style:name="gr6" style:family="graphic" style:parent-style-name="Heading_20_A4">
      <style:graphic-properties draw:textarea-horizontal-align="left" draw:auto-grow-height="true" draw:auto-grow-width="true" fo:min-height="0.556cm" fo:min-width="5.505cm" loext:decorative="false"/>
      <style:paragraph-properties style:writing-mode="lr-tb"/>
    </style:style>
    <style:style style:name="gr7" style:family="graphic" style:parent-style-name="Text_20_A4">
      <style:graphic-properties fo:min-height="0.556cm" loext:decorative="false"/>
      <style:paragraph-properties style:writing-mode="lr-tb"/>
    </style:style>
    <style:style style:name="gr8" style:family="graphic" style:parent-style-name="Heading_20_A4">
      <style:graphic-properties draw:textarea-horizontal-align="left" draw:auto-grow-height="true" draw:auto-grow-width="true" fo:min-height="0.556cm" fo:min-width="5.892cm" loext:decorative="false"/>
      <style:paragraph-properties style:writing-mode="lr-tb"/>
    </style:style>
    <style:style style:name="gr9" style:family="graphic" style:parent-style-name="Text_20_A4">
      <style:graphic-properties draw:textarea-horizontal-align="left" draw:auto-grow-height="true" draw:auto-grow-width="true" fo:min-height="0.556cm" fo:min-width="4.183cm" loext:decorative="false"/>
      <style:paragraph-properties style:writing-mode="lr-tb"/>
    </style:style>
    <style:style style:name="gr10" style:family="graphic" style:parent-style-name="Heading_20_A4">
      <style:graphic-properties draw:textarea-horizontal-align="left" draw:auto-grow-height="true" draw:auto-grow-width="true" fo:min-height="0.556cm" fo:min-width="4.737cm" loext:decorative="false"/>
      <style:paragraph-properties style:writing-mode="lr-tb"/>
    </style:style>
    <style:style style:name="gr11" style:family="graphic" style:parent-style-name="Text_20_A4">
      <style:graphic-properties draw:textarea-horizontal-align="left" draw:auto-grow-height="true" draw:auto-grow-width="true" fo:min-height="0.556cm" fo:min-width="3.99cm" loext:decorative="false"/>
      <style:paragraph-properties style:writing-mode="lr-tb"/>
    </style:style>
    <style:style style:name="gr12" style:family="graphic" style:parent-style-name="Heading_20_A4">
      <style:graphic-properties draw:textarea-horizontal-align="left" draw:auto-grow-height="true" draw:auto-grow-width="true" fo:min-height="0.556cm" fo:min-width="3.606cm" loext:decorative="false"/>
      <style:paragraph-properties style:writing-mode="lr-tb"/>
    </style:style>
    <style:style style:name="gr13" style:family="graphic" style:parent-style-name="Text_20_A4">
      <style:graphic-properties draw:textarea-horizontal-align="left" draw:auto-grow-height="true" draw:auto-grow-width="true" fo:min-height="0.556cm" fo:min-width="0.687cm" loext:decorative="false"/>
      <style:paragraph-properties style:writing-mode="lr-tb"/>
    </style:style>
    <style:style style:name="gr14" style:family="graphic" style:parent-style-name="note">
      <style:graphic-properties draw:textarea-horizontal-align="left" draw:auto-grow-height="true" draw:auto-grow-width="true" fo:min-height="0.285cm" fo:min-width="1.793cm" loext:decorative="false"/>
      <style:paragraph-properties style:writing-mode="lr-tb"/>
    </style:style>
    <style:style style:name="gr15" style:family="graphic" style:parent-style-name="Title_20_A4">
      <style:graphic-properties draw:textarea-horizontal-align="left" draw:auto-grow-height="true" draw:auto-grow-width="true" fo:min-height="0.636cm" fo:min-width="3.177cm" loext:decorative="false"/>
      <style:paragraph-properties style:writing-mode="lr-tb"/>
    </style:style>
    <style:style style:name="gr16" style:family="graphic" style:parent-style-name="Heading_20_A4">
      <style:graphic-properties draw:textarea-horizontal-align="left" draw:auto-grow-height="true" draw:auto-grow-width="true" fo:min-height="0.556cm" fo:min-width="1.379cm" loext:decorative="false"/>
      <style:paragraph-properties style:writing-mode="lr-tb"/>
    </style:style>
    <style:style style:name="gr17" style:family="graphic" style:parent-style-name="Heading_20_A4">
      <style:graphic-properties draw:textarea-horizontal-align="left" draw:auto-grow-height="true" draw:auto-grow-width="true" fo:min-height="0.556cm" fo:min-width="3.196cm" loext:decorative="false"/>
      <style:paragraph-properties style:writing-mode="lr-tb"/>
    </style:style>
    <style:style style:name="gr18" style:family="graphic" style:parent-style-name="Text_20_A4">
      <style:graphic-properties draw:textarea-horizontal-align="left" draw:auto-grow-height="true" draw:auto-grow-width="true" fo:min-height="0.556cm" fo:min-width="4.903cm" loext:decorative="false"/>
      <style:paragraph-properties style:writing-mode="lr-tb"/>
    </style:style>
    <style:style style:name="gr19" style:family="graphic" style:parent-style-name="Heading_20_A4">
      <style:graphic-properties draw:textarea-horizontal-align="left" draw:auto-grow-height="true" draw:auto-grow-width="true" fo:min-height="0.556cm" fo:min-width="1.763cm" loext:decorative="false"/>
      <style:paragraph-properties style:writing-mode="lr-tb"/>
    </style:style>
    <style:style style:name="gr20" style:family="graphic" style:parent-style-name="Text_20_A4">
      <style:graphic-properties draw:textarea-horizontal-align="left" draw:auto-grow-height="true" draw:auto-grow-width="true" fo:min-height="0.556cm" fo:min-width="6.115cm" loext:decorative="false"/>
      <style:paragraph-properties style:writing-mode="lr-tb"/>
    </style:style>
    <style:style style:name="gr21" style:family="graphic" style:parent-style-name="Heading_20_A4">
      <style:graphic-properties draw:textarea-horizontal-align="left" draw:auto-grow-height="true" draw:auto-grow-width="true" fo:min-height="0.556cm" fo:min-width="3.525cm" loext:decorative="false"/>
      <style:paragraph-properties style:writing-mode="lr-tb"/>
    </style:style>
    <style:style style:name="gr22" style:family="graphic" style:parent-style-name="Text_20_A4">
      <style:graphic-properties draw:textarea-horizontal-align="left" draw:auto-grow-height="true" draw:auto-grow-width="true" fo:min-height="0.556cm" fo:min-width="5.7cm" loext:decorative="false"/>
      <style:paragraph-properties style:writing-mode="lr-tb"/>
    </style:style>
    <style:style style:name="gr23" style:family="graphic" style:parent-style-name="Heading_20_A4">
      <style:graphic-properties draw:textarea-horizontal-align="left" draw:auto-grow-height="true" draw:auto-grow-width="true" fo:min-height="0.556cm" fo:min-width="1.516cm" loext:decorative="false"/>
      <style:paragraph-properties style:writing-mode="lr-tb"/>
    </style:style>
    <style:style style:name="gr24" style:family="graphic" style:parent-style-name="Text_20_A4">
      <style:graphic-properties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25" style:family="graphic" style:parent-style-name="Heading_20_A4">
      <style:graphic-properties draw:textarea-horizontal-align="left" draw:auto-grow-height="true" draw:auto-grow-width="true" fo:min-height="0.556cm" fo:min-width="5.231cm" loext:decorative="false"/>
      <style:paragraph-properties style:writing-mode="lr-tb"/>
    </style:style>
    <style:style style:name="gr26" style:family="graphic" style:parent-style-name="Text_20_A4">
      <style:graphic-properties draw:textarea-horizontal-align="left" draw:auto-grow-height="true" draw:auto-grow-width="false" fo:min-height="0.547cm" fo:min-width="0cm" loext:decorative="false"/>
      <style:paragraph-properties style:writing-mode="lr-tb"/>
    </style:style>
    <style:style style:name="gr27" style:family="graphic" style:parent-style-name="note">
      <style:graphic-properties draw:textarea-horizontal-align="left" draw:auto-grow-height="true" draw:auto-grow-width="false" fo:min-height="1.171cm" fo:min-width="0cm" loext:decorative="false"/>
      <style:paragraph-properties style:writing-mode="lr-tb"/>
    </style:style>
    <style:style style:name="gr28" style:family="graphic" style:parent-style-name="Heading_20_A4">
      <style:graphic-properties draw:textarea-horizontal-align="left" draw:auto-grow-height="true" draw:auto-grow-width="true" fo:min-height="0.556cm" fo:min-width="2.754cm" loext:decorative="false"/>
      <style:paragraph-properties style:writing-mode="lr-tb"/>
    </style:style>
    <style:style style:name="gr29" style:family="graphic" style:parent-style-name="Text_20_A4">
      <style:graphic-properties draw:textarea-horizontal-align="left" draw:auto-grow-height="true" draw:auto-grow-width="true" fo:min-height="0.547cm" fo:min-width="5.3cm" loext:decorative="false"/>
      <style:paragraph-properties style:writing-mode="lr-tb"/>
    </style:style>
    <style:style style:name="gr30" style:family="graphic" style:parent-style-name="Title_20_A4">
      <style:graphic-properties draw:textarea-horizontal-align="left" draw:auto-grow-height="true" draw:auto-grow-width="false" fo:min-height="1.271cm" fo:min-width="0cm" loext:decorative="false"/>
      <style:paragraph-properties style:writing-mode="lr-tb"/>
    </style:style>
    <style:style style:name="gr31" style:family="graphic" style:parent-style-name="Heading_20_A4">
      <style:graphic-properties draw:textarea-horizontal-align="left" draw:auto-grow-height="true" draw:auto-grow-width="true" fo:min-height="0.556cm" fo:min-width="1.295cm" loext:decorative="false"/>
      <style:paragraph-properties style:writing-mode="lr-tb"/>
    </style:style>
    <style:style style:name="gr32" style:family="graphic" style:parent-style-name="Text_20_A4">
      <style:graphic-properties fo:min-height="2.221cm" loext:decorative="false"/>
      <style:paragraph-properties style:writing-mode="lr-tb"/>
    </style:style>
    <style:style style:name="gr33" style:family="graphic" style:parent-style-name="Heading_20_A4">
      <style:graphic-properties draw:textarea-horizontal-align="left" draw:auto-grow-height="true" draw:auto-grow-width="true" fo:min-height="0.556cm" fo:min-width="1.461cm" loext:decorative="false"/>
      <style:paragraph-properties style:writing-mode="lr-tb"/>
    </style:style>
    <style:style style:name="gr34" style:family="graphic" style:parent-style-name="Text_20_A4">
      <style:graphic-properties fo:min-height="2.776cm" loext:decorative="false"/>
      <style:paragraph-properties style:writing-mode="lr-tb"/>
    </style:style>
    <style:style style:name="gr35" style:family="graphic" style:parent-style-name="Heading_20_A4">
      <style:graphic-properties draw:textarea-horizontal-align="left" draw:auto-grow-height="true" draw:auto-grow-width="true" fo:min-height="0.556cm" fo:min-width="1.819cm" loext:decorative="false"/>
      <style:paragraph-properties style:writing-mode="lr-tb"/>
    </style:style>
    <style:style style:name="gr36" style:family="graphic" style:parent-style-name="Heading_20_A4">
      <style:graphic-properties draw:textarea-horizontal-align="left" draw:auto-grow-height="true" draw:auto-grow-width="true" fo:min-height="0.556cm" fo:min-width="1.846cm" loext:decorative="false"/>
      <style:paragraph-properties style:writing-mode="lr-tb"/>
    </style:style>
    <style:style style:name="gr37" style:family="graphic" style:parent-style-name="Heading_20_A4">
      <style:graphic-properties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38" style:family="graphic" style:parent-style-name="Text_20_A4">
      <style:graphic-properties fo:min-height="3.886cm" loext:decorative="false"/>
      <style:paragraph-properties style:writing-mode="lr-tb"/>
    </style:style>
    <style:style style:name="gr39" style:family="graphic" style:parent-style-name="Text_20_A4">
      <style:graphic-properties fo:min-height="15.541cm" loext:decorative="false"/>
      <style:paragraph-properties style:writing-mode="lr-tb"/>
    </style:style>
    <style:style style:name="gr40" style:family="graphic" style:parent-style-name="Title_20_A4">
      <style:graphic-properties draw:textarea-horizontal-align="right" draw:auto-grow-height="true" draw:auto-grow-width="true" fo:min-height="0.636cm" fo:min-width="2.905cm" loext:decorative="false"/>
      <style:paragraph-properties style:writing-mode="lr-tb"/>
    </style:style>
    <style:style style:name="gr41" style:family="graphic" style:parent-style-name="note">
      <style:graphic-properties fo:min-height="1.171cm" loext:decorative="false"/>
      <style:paragraph-properties style:writing-mode="lr-tb"/>
    </style:style>
    <style:style style:name="gr42" style:family="graphic" style:parent-style-name="Text_20_A4">
      <style:graphic-properties draw:textarea-horizontal-align="left" draw:auto-grow-height="true" draw:auto-grow-width="false" fo:min-height="1.905cm" fo:min-width="0cm" loext:decorative="false"/>
      <style:paragraph-properties style:writing-mode="lr-tb"/>
    </style:style>
    <style:style style:name="gr43" style:family="graphic" style:parent-style-name="note">
      <style:graphic-properties draw:textarea-horizontal-align="left" draw:auto-grow-height="true" draw:auto-grow-width="true" fo:min-height="0.285cm" fo:min-width="6.241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tyle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tyle="normal" style:text-underline-style="solid" style:text-underline-width="auto" style:text-underline-color="font-color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fo:font-style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1"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23cm" svg:height="1.588cm" svg:x="1.452cm" svg:y="1.317cm">
          <draw:text-box>
            <text:p text:style-name="P1">Rolls</text:p>
          </draw:text-box>
        </draw:frame>
        <draw:frame draw:style-name="gr2" draw:layer="layout" svg:width="7.337cm" svg:height="0.391cm" svg:x="1.023cm" svg:y="26.655cm">
          <draw:text-box>
            <text:p>d4, d6, d8, d10, d12, d20 by Lonnie Tapscott (CC BY 3.0)</text:p>
          </draw:text-box>
        </draw:frame>
        <draw:frame draw:style-name="gr3" draw:layer="layout" svg:width="5.12cm" svg:height="0.556cm" svg:x="1.635cm" svg:y="2.149cm">
          <draw:text-box>
            <text:p>Attack (attempt to hit)</text:p>
          </draw:text-box>
        </draw:frame>
        <draw:frame draw:style-name="gr4" draw:layer="layout" svg:width="6.192cm" svg:height="0.556cm" svg:x="1.158cm" svg:y="3.34cm">
          <draw:text-box>
            <text:p>your AV - <text:s text:c="5"/><text:s text:c="8"/><text:span text:style-name="T1">≤</text:span> their AC</text:p>
          </draw:text-box>
        </draw:frame>
        <draw:frame draw:style-name="gr5" draw:text-style-name="P2" draw:layer="layout" svg:width="1.987cm" svg:height="1.845cm" svg:x="3.14cm" svg:y="2.705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3BA6803A.png" xlink:type="simple" xlink:show="embed" xlink:actuate="onLoad" draw:mime-type="image/png"/>
        </draw:frame>
        <draw:frame draw:style-name="gr6" draw:layer="layout" svg:width="5.505cm" svg:height="0.556cm" svg:x="1.635cm" svg:y="4.489cm">
          <draw:text-box>
            <text:p>Dodge (avoid being hit)</text:p>
          </draw:text-box>
        </draw:frame>
        <draw:frame draw:style-name="gr7" draw:layer="layout" svg:width="5.053cm" svg:height="0.556cm" svg:x="2.932cm" svg:y="5.597cm">
          <draw:text-box>
            <text:p>+ your AC ≤ their AV</text:p>
          </draw:text-box>
        </draw:frame>
        <draw:frame draw:style-name="gr5" draw:text-style-name="P2" draw:layer="layout" svg:width="1.987cm" svg:height="1.845cm" svg:x="1cm" svg:y="4.962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3BA6803A.png" xlink:type="simple" xlink:show="embed" xlink:actuate="onLoad" draw:mime-type="image/png"/>
        </draw:frame>
        <draw:frame draw:style-name="gr8" draw:layer="layout" svg:width="5.892cm" svg:height="0.556cm" svg:x="1.635cm" svg:y="6.946cm">
          <draw:text-box>
            <text:p>Ability (str, dex, con, etc)</text:p>
          </draw:text-box>
        </draw:frame>
        <draw:frame draw:style-name="gr9" draw:layer="layout" svg:width="4.183cm" svg:height="0.556cm" svg:x="2.905cm" svg:y="8.137cm">
          <draw:text-box>
            <text:p><text:span text:style-name="T1">≤</text:span> your Ability score</text:p>
          </draw:text-box>
        </draw:frame>
        <draw:frame draw:style-name="gr5" draw:text-style-name="P2" draw:layer="layout" svg:width="1.987cm" svg:height="1.845cm" svg:x="1cm" svg:y="7.562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3BA6803A.png" xlink:type="simple" xlink:show="embed" xlink:actuate="onLoad" draw:mime-type="image/png"/>
        </draw:frame>
        <draw:frame draw:style-name="gr10" draw:layer="layout" svg:width="4.737cm" svg:height="0.556cm" svg:x="1.635cm" svg:y="9.486cm">
          <draw:text-box>
            <text:p>Save (avoid special)</text:p>
          </draw:text-box>
        </draw:frame>
        <draw:frame draw:style-name="gr11" draw:layer="layout" svg:width="3.99cm" svg:height="0.556cm" svg:x="3.042cm" svg:y="10.556cm">
          <draw:text-box>
            <text:p><text:span text:style-name="T1">≥</text:span> your Save score</text:p>
          </draw:text-box>
        </draw:frame>
        <draw:frame draw:style-name="gr5" draw:text-style-name="P2" draw:layer="layout" svg:width="1.987cm" svg:height="1.845cm" svg:x="1cm" svg:y="10.002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3BA6803A.png" xlink:type="simple" xlink:show="embed" xlink:actuate="onLoad" draw:mime-type="image/png"/>
        </draw:frame>
        <draw:frame draw:style-name="gr12" draw:layer="layout" svg:width="3.606cm" svg:height="0.556cm" svg:x="1.635cm" svg:y="11.865cm">
          <draw:text-box>
            <text:p>Listen (at door)</text:p>
          </draw:text-box>
        </draw:frame>
        <draw:frame draw:style-name="gr13" draw:layer="layout" svg:width="0.687cm" svg:height="0.556cm" svg:x="2.905cm" svg:y="12.935cm">
          <draw:text-box>
            <text:p><text:span text:style-name="T1">≥</text:span> 6</text:p>
          </draw:text-box>
        </draw:frame>
        <draw:frame draw:style-name="gr5" draw:text-style-name="P2" draw:layer="layout" svg:width="1.987cm" svg:height="1.845cm" svg:x="0.918cm" svg:y="12.36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14" draw:text-style-name="P3" draw:layer="layout" svg:width="2.007cm" svg:height="0.391cm" svg:x="2.699cm" svg:y="13.887cm">
          <draw:text-box>
            <text:p><text:span text:style-name="T2">+ Bonus if thief</text:span></text:p>
          </draw:text-box>
        </draw:frame>
        <draw:frame draw:style-name="gr15" draw:text-style-name="P3" draw:layer="layout" svg:width="3.177cm" svg:height="0.865cm" svg:x="6.08cm" svg:y="19.732cm">
          <draw:text-box>
            <text:p><text:span text:style-name="T2">Rol</text:span><text:span text:style-name="T2">es</text:span></text:p>
          </draw:text-box>
        </draw:frame>
        <draw:frame draw:style-name="gr16" draw:text-style-name="P3" draw:layer="layout" svg:width="1.379cm" svg:height="0.556cm" svg:x="8.176cm" svg:y="20.585cm">
          <draw:text-box>
            <text:p><text:span text:style-name="T2">Caller</text:span></text:p>
          </draw:text-box>
        </draw:frame>
        <draw:frame draw:style-name="gr7" draw:layer="layout" svg:width="6.258cm" svg:height="0.556cm" svg:x="7.6cm" svg:y="21.302cm">
          <draw:text-box>
            <text:p>Direct party, get consensus</text:p>
          </draw:text-box>
        </draw:frame>
        <draw:frame draw:style-name="gr17" draw:text-style-name="P3" draw:layer="layout" svg:width="3.196cm" svg:height="0.556cm" svg:x="8.146cm" svg:y="21.946cm">
          <draw:text-box>
            <text:p><text:span text:style-name="T2">Score Keeper</text:span></text:p>
          </draw:text-box>
        </draw:frame>
        <draw:frame draw:style-name="gr18" draw:text-style-name="P3" draw:layer="layout" svg:width="4.903cm" svg:height="0.556cm" svg:x="7.667cm" svg:y="22.502cm">
          <draw:text-box>
            <text:p><text:span text:style-name="T2">Note treasure, and XP</text:span></text:p>
          </draw:text-box>
        </draw:frame>
        <draw:frame draw:style-name="gr19" draw:text-style-name="P3" draw:layer="layout" svg:width="1.763cm" svg:height="0.556cm" svg:x="1.635cm" svg:y="21.716cm">
          <draw:text-box>
            <text:p><text:span text:style-name="T2">Mapper</text:span></text:p>
          </draw:text-box>
        </draw:frame>
        <draw:frame draw:style-name="gr20" draw:text-style-name="P3" draw:layer="layout" svg:width="6.115cm" svg:height="0.556cm" svg:x="1cm" svg:y="22.351cm">
          <draw:text-box>
            <text:p><text:span text:style-name="T2">Track dungeon and location</text:span></text:p>
          </draw:text-box>
        </draw:frame>
        <draw:frame draw:style-name="gr21" draw:text-style-name="P3" draw:layer="layout" svg:width="3.525cm" svg:height="0.556cm" svg:x="8.135cm" svg:y="23.216cm">
          <draw:text-box>
            <text:p><text:span text:style-name="T2">Quarter Master</text:span></text:p>
          </draw:text-box>
        </draw:frame>
        <draw:frame draw:style-name="gr22" draw:text-style-name="P3" draw:layer="layout" svg:width="5.7cm" svg:height="0.556cm" svg:x="7.667cm" svg:y="23.851cm">
          <draw:text-box>
            <text:p><text:span text:style-name="T2">Track torches, rations, etc</text:span></text:p>
          </draw:text-box>
        </draw:frame>
        <draw:frame draw:style-name="gr23" draw:text-style-name="P3" draw:layer="layout" svg:width="1.516cm" svg:height="0.556cm" svg:x="1.706cm" svg:y="22.886cm">
          <draw:text-box>
            <text:p><text:span text:style-name="T2">Scribe</text:span></text:p>
          </draw:text-box>
        </draw:frame>
        <draw:frame draw:style-name="gr24" draw:text-style-name="P3" draw:layer="layout" svg:width="6.667cm" svg:height="1.111cm" svg:x="1cm" svg:y="23.521cm">
          <draw:text-box>
            <text:p><text:span text:style-name="T2">Keep track of monster behavior and statistics</text:span></text:p>
          </draw:text-box>
        </draw:frame>
        <draw:frame draw:style-name="gr25" draw:layer="layout" svg:width="5.231cm" svg:height="0.556cm" svg:x="1.635cm" svg:y="14.322cm">
          <draw:text-box>
            <text:p>Turn <text:s/>Undead (clerics)</text:p>
          </draw:text-box>
        </draw:frame>
        <draw:frame draw:style-name="gr26" draw:layer="layout" svg:width="2.819cm" svg:height="0.547cm" svg:x="4.492cm" svg:y="15.363cm">
          <draw:text-box>
            <text:p><text:span text:style-name="T1">≥ lookup(HD)</text:span></text:p>
          </draw:text-box>
        </draw:frame>
        <draw:frame draw:style-name="gr5" draw:text-style-name="P2" draw:layer="layout" svg:width="1.987cm" svg:height="1.845cm" svg:x="0.919cm" svg:y="14.975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5" draw:text-style-name="P2" draw:layer="layout" svg:width="1.987cm" svg:height="1.845cm" svg:x="2.505cm" svg:y="14.957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27" draw:text-style-name="P3" draw:layer="layout" svg:width="2.54cm" svg:height="1.171cm" svg:x="4.492cm" svg:y="15.985cm">
          <draw:text-box>
            <text:p><text:span text:style-name="T2">Then turn/destroy </text:span><text:span text:style-name="T2"><text:tab/></text:span><text:span text:style-name="T2"> <text:s text:c="11"/></text:span></text:p>
          </draw:text-box>
        </draw:frame>
        <draw:frame draw:style-name="gr5" draw:text-style-name="P2" draw:layer="layout" svg:width="0.97cm" svg:height="0.901cm" svg:x="5.109cm" svg:y="16.295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5" draw:text-style-name="P2" draw:layer="layout" svg:width="0.97cm" svg:height="0.9cm" svg:x="5.91cm" svg:y="16.304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28" draw:layer="layout" svg:width="2.754cm" svg:height="0.556cm" svg:x="1.635cm" svg:y="17.415cm">
          <draw:text-box>
            <text:p>Thief Skills </text:p>
          </draw:text-box>
        </draw:frame>
        <draw:frame draw:style-name="gr29" draw:layer="layout" svg:width="5.3cm" svg:height="0.547cm" svg:x="2.905cm" svg:y="18.573cm">
          <draw:text-box>
            <text:p><text:span text:style-name="T1">x10 + <text:s text:c="13"/>≤ skill score</text:span></text:p>
          </draw:text-box>
        </draw:frame>
        <draw:frame draw:style-name="gr5" draw:text-style-name="P2" draw:layer="layout" svg:width="1.987cm" svg:height="1.845cm" svg:x="1cm" svg:y="17.91cm">
          <draw:image xlink:href="Pictures/1000059E00000A7000000D06896E62DB.svg" xlink:type="simple" xlink:show="embed" xlink:actuate="onLoad" draw:mime-type="image/svg+xml">
            <text:p/>
          </draw:image>
          <draw:image xlink:href="Pictures/10000001000000650000007EEA75F999.png" xlink:type="simple" xlink:show="embed" xlink:actuate="onLoad" draw:mime-type="image/png"/>
        </draw:frame>
        <draw:frame draw:style-name="gr5" draw:text-style-name="P2" draw:layer="layout" svg:width="1.987cm" svg:height="1.845cm" svg:x="3.838cm" svg:y="17.885cm">
          <draw:image xlink:href="Pictures/1000059E00000A7000000D06896E62DB.svg" xlink:type="simple" xlink:show="embed" xlink:actuate="onLoad" draw:mime-type="image/svg+xml">
            <text:p/>
          </draw:image>
          <draw:image xlink:href="Pictures/10000001000000650000007EEA75F999.png" xlink:type="simple" xlink:show="embed" xlink:actuate="onLoad" draw:mime-type="image/png"/>
        </draw:frame>
        <draw:frame draw:style-name="gr30" draw:text-style-name="P3" draw:layer="layout" svg:width="5.08cm" svg:height="1.271cm" svg:x="14.97cm" svg:y="1.317cm">
          <draw:text-box>
            <text:p><text:span text:style-name="T2">Schemes</text:span></text:p>
          </draw:text-box>
        </draw:frame>
        <draw:frame draw:style-name="gr31" draw:text-style-name="P3" draw:layer="layout" svg:width="1.295cm" svg:height="0.556cm" svg:x="13.785cm" svg:y="2.152cm">
          <draw:text-box>
            <text:p><text:span text:style-name="T2">Town</text:span></text:p>
          </draw:text-box>
        </draw:frame>
        <draw:frame draw:style-name="gr32" draw:layer="layout" svg:width="5.508cm" svg:height="2.221cm" svg:x="13.807cm" svg:y="2.905cm">
          <draw:text-box>
            <text:list text:style-name="L3">
              <text:list-item>
                <text:p>Characterless sheets</text:p>
              </text:list-item>
              <text:list-item>
                <text:p>Equipment</text:p>
              </text:list-item>
              <text:list-item>
                <text:p>Downtime (optional)</text:p>
              </text:list-item>
              <text:list-item>
                <text:p>Minions (optional)</text:p>
              </text:list-item>
            </text:list>
          </draw:text-box>
        </draw:frame>
        <draw:frame draw:style-name="gr33" draw:text-style-name="P3" draw:layer="layout" svg:width="1.461cm" svg:height="0.556cm" svg:x="13.785cm" svg:y="5.152cm">
          <draw:text-box>
            <text:p><text:span text:style-name="T2">Travel</text:span></text:p>
          </draw:text-box>
        </draw:frame>
        <draw:frame draw:style-name="gr34" draw:layer="layout" svg:width="6.784cm" svg:height="2.776cm" svg:x="13.806cm" svg:y="5.762cm">
          <draw:text-box>
            <text:list text:style-name="L2">
              <text:list-item>
                <text:p>3 watches per day</text:p>
              </text:list-item>
              <text:list-item>
                <text:p>Each watch: </text:p>
                <text:list>
                  <text:list-item>
                    <text:p>Travel one path, or explore that point; </text:p>
                  </text:list-item>
                  <text:list-item>
                    <text:p>Consume rations </text:p>
                  </text:list-item>
                </text:list>
              </text:list-item>
            </text:list>
          </draw:text-box>
        </draw:frame>
        <draw:frame draw:style-name="gr35" draw:text-style-name="P3" draw:layer="layout" svg:width="1.819cm" svg:height="0.556cm" svg:x="13.7cm" svg:y="8.62cm">
          <draw:text-box>
            <text:p><text:span text:style-name="T2">Explore</text:span></text:p>
          </draw:text-box>
        </draw:frame>
        <draw:frame draw:style-name="gr32" draw:layer="layout" svg:width="5.969cm" svg:height="2.221cm" svg:x="13.763cm" svg:y="9.256cm">
          <draw:text-box>
            <text:list text:style-name="L3">
              <text:list-item>
                <text:p>Listen and open door</text:p>
              </text:list-item>
              <text:list-item>
                <text:p>Encounter</text:p>
              </text:list-item>
              <text:list-item>
                <text:p>Mapping</text:p>
              </text:list-item>
              <text:list-item>
                <text:p>Searching (optional)</text:p>
              </text:list-item>
            </text:list>
          </draw:text-box>
        </draw:frame>
        <draw:frame draw:style-name="gr36" draw:text-style-name="P3" draw:layer="layout" svg:width="1.846cm" svg:height="0.556cm" svg:x="13.785cm" svg:y="11.452cm">
          <draw:text-box>
            <text:p><text:span text:style-name="T2">Combat</text:span></text:p>
          </draw:text-box>
        </draw:frame>
        <draw:frame draw:style-name="gr34" draw:layer="layout" svg:width="6.784cm" svg:height="2.776cm" svg:x="13.806cm" svg:y="12.062cm">
          <draw:text-box>
            <text:list text:style-name="L2">
              <text:list-item>
                <text:p>Initiative: players d6 vs monsters d6.</text:p>
              </text:list-item>
              <text:list-item>
                <text:p>One action each round.</text:p>
              </text:list-item>
              <text:list-item>
                <text:p>Actions: Move&amp;attack, run, focus, magic, stunts.</text:p>
              </text:list-item>
            </text:list>
          </draw:text-box>
        </draw:frame>
        <draw:frame draw:style-name="gr37" draw:text-style-name="P3" draw:layer="layout" svg:width="3.406cm" svg:height="1.111cm" svg:x="13.786cm" svg:y="14.752cm">
          <draw:text-box>
            <text:p><text:span text:style-name="T2">Negotiation</text:span></text:p>
          </draw:text-box>
        </draw:frame>
        <draw:frame draw:style-name="gr38" draw:layer="layout" svg:width="6.784cm" svg:height="3.886cm" svg:x="13.807cm" svg:y="15.362cm">
          <draw:text-box>
            <text:list text:style-name="L2">
              <text:list-item>
                <text:p>Check motivation: int or wis check. Success: DM confirms motivation. Failure: loose patience.</text:p>
              </text:list-item>
              <text:list-item>
                <text:p>Make an argument: if it doesn’t appeal to a pitfall, make a wis or cha check.</text:p>
              </text:list-item>
            </text:list>
          </draw:text-box>
        </draw:frame>
        <draw:frame draw:style-name="gr37" draw:text-style-name="P3" draw:layer="layout" svg:width="3.406cm" svg:height="1.111cm" svg:x="13.787cm" svg:y="19.352cm">
          <draw:text-box>
            <text:p><text:span text:style-name="T2">Challenge</text:span></text:p>
          </draw:text-box>
        </draw:frame>
        <draw:frame draw:style-name="gr38" draw:layer="layout" svg:width="6.784cm" svg:height="3.886cm" svg:x="13.808cm" svg:y="19.962cm">
          <draw:text-box>
            <text:list text:style-name="L3">
              <text:list-item>
                <text:p>Target successes &amp; failures</text:p>
              </text:list-item>
              <text:list-item>
                <text:p>Propose action and support</text:p>
              </text:list-item>
              <text:list-item>
                <text:p>Ability check + advantage for each supporter</text:p>
              </text:list-item>
              <text:list-item>
                <text:p>Repeat 2 &amp; 3</text:p>
              </text:list-item>
            </text:list>
            <text:p><text:span text:style-name="T3">Risky: </text:span>worth 2 success or failure; has 2 disadvantages.</text:p>
          </draw:text-box>
        </draw:frame>
        <draw:frame draw:style-name="gr37" draw:text-style-name="P3" draw:layer="layout" svg:width="3.406cm" svg:height="1.111cm" svg:x="13.787cm" svg:y="14.752cm">
          <draw:text-box>
            <text:p><text:span text:style-name="T2">Negotiation</text:span></text:p>
          </draw:text-box>
        </draw:frame>
        <draw:frame draw:style-name="gr38" draw:layer="layout" svg:width="6.784cm" svg:height="3.886cm" svg:x="13.808cm" svg:y="15.362cm">
          <draw:text-box>
            <text:list text:style-name="L2">
              <text:list-item>
                <text:p>Check motivation: int or wis check. Success: DM confirms motivation. Failure: loose patience.</text:p>
              </text:list-item>
              <text:list-item>
                <text:p>Make an argument: if it doesn’t appeal to a pitfall, make a wis or cha check.</text:p>
              </text:list-item>
            </text:list>
          </draw:text-box>
        </draw:frame>
        <draw:frame draw:style-name="gr39" draw:layer="layout" svg:width="6.022cm" svg:height="16.096cm" svg:x="7.678cm" svg:y="2.27cm">
          <draw:text-box>
            <text:p><text:span text:style-name="T3">How many item slots do I have?</text:span></text:p>
            <text:p>Depends on con: 8 is 9 slots, 9-12 is 10. 13 is 11.</text:p>
            <text:p><text:span text:style-name="T3">How to get more slots?</text:span></text:p>
            <text:p><text:span text:style-name="T4">B</text:span>uy a chest, buy a horse and cart, hire some minions</text:p>
            <text:p><text:span text:style-name="T3">How to get un-poisoned?</text:span></text:p>
            <text:p>Antidote can cure many poisons. The spell remove poison can heal most others.</text:p>
            <text:p><text:span text:style-name="T3">How much HP do I have?</text:span></text:p>
            <text:p><text:span text:style-name="T4">Depends on class: fighters 8, clerics 6, thieves and wizards 4.</text:span></text:p>
            <text:p><text:span text:style-name="T3">What happens when damage exceeds my HP?</text:span></text:p>
            <text:p><text:span text:style-name="T5">You are “near death.” Any further damage you must dismember, and risk death. when you are healed, you will dismember a final time.</text:span></text:p>
            <text:p><text:span text:style-name="T3">How to get minions?</text:span></text:p>
            <text:p>2nd level characters can attract them in town, or specialists can be hired.</text:p>
            <text:p/>
          </draw:text-box>
        </draw:frame>
        <draw:frame draw:style-name="gr40" draw:text-style-name="P1" draw:layer="layout" svg:width="2.905cm" svg:height="0.865cm" svg:x="8.02cm" svg:y="1.317cm">
          <draw:text-box>
            <text:p text:style-name="P1">FAQs</text:p>
          </draw:text-box>
        </draw:frame>
        <draw:frame draw:style-name="gr41" draw:text-style-name="P5" draw:layer="layout" svg:width="2.858cm" svg:height="1.171cm" svg:x="4.492cm" svg:y="17.192cm">
          <draw:text-box>
            <text:p text:style-name="P4"><text:span text:style-name="T2">HD worth of undead, weakest first.</text:span></text:p>
          </draw:text-box>
        </draw:frame>
        <draw:frame draw:style-name="gr42" draw:text-style-name="P3" draw:layer="layout" svg:width="6.75cm" svg:height="1.905cm" svg:x="0.917cm" svg:y="20.602cm">
          <draw:text-box>
            <text:p><text:span text:style-name="T2">Score 50xp for </text:span><text:span text:style-name="T2">each role </text:span><text:span text:style-name="T2">announced in town</text:span></text:p>
          </draw:text-box>
        </draw:frame>
        <draw:frame draw:style-name="gr43" draw:layer="layout" svg:width="7.236cm" svg:height="0.391cm" svg:x="14.335cm" svg:y="26.655cm">
          <draw:text-box>
            <text:p>For reference only. Appeal to source books for rulings.</text:p>
          </draw:text-box>
        </draw:frame>
        <draw:frame draw:style-name="gr5" draw:text-style-name="P2" draw:layer="layout" svg:width="2.016cm" svg:height="1.873cm" svg:x="4.912cm" svg:y="24.409cm">
          <draw:image xlink:href="Pictures/1000033900000A7000000D06DC9E3C64.svg" xlink:type="simple" xlink:show="embed" xlink:actuate="onLoad" draw:mime-type="image/svg+xml">
            <text:p/>
          </draw:image>
          <draw:image xlink:href="Pictures/10000001000000650000007EF25DE3A7.png" xlink:type="simple" xlink:show="embed" xlink:actuate="onLoad" draw:mime-type="image/png"/>
        </draw:frame>
        <draw:frame draw:style-name="gr5" draw:text-style-name="P2" draw:layer="layout" svg:width="2.016cm" svg:height="1.873cm" svg:x="8.611cm" svg:y="24.409cm">
          <draw:image xlink:href="Pictures/1000061800000A7000000D06721052B5.svg" xlink:type="simple" xlink:show="embed" xlink:actuate="onLoad" draw:mime-type="image/svg+xml">
            <text:p/>
          </draw:image>
          <draw:image xlink:href="Pictures/10000001000000650000007E496632EC.png" xlink:type="simple" xlink:show="embed" xlink:actuate="onLoad" draw:mime-type="image/png"/>
        </draw:frame>
        <draw:frame draw:style-name="gr5" draw:text-style-name="P2" draw:layer="layout" svg:width="2.016cm" svg:height="1.872cm" svg:x="6.683cm" svg:y="24.411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55B32220.png" xlink:type="simple" xlink:show="embed" xlink:actuate="onLoad" draw:mime-type="image/png"/>
        </draw:frame>
        <draw:frame draw:style-name="gr5" draw:text-style-name="P2" draw:layer="layout" svg:width="2.017cm" svg:height="1.872cm" svg:x="10.576cm" svg:y="24.411cm">
          <draw:image xlink:href="Pictures/1000059E00000A7000000D06896E62DB.svg" xlink:type="simple" xlink:show="embed" xlink:actuate="onLoad" draw:mime-type="image/svg+xml">
            <text:p/>
          </draw:image>
          <draw:image xlink:href="Pictures/10000001000000650000007EEA75F999.png" xlink:type="simple" xlink:show="embed" xlink:actuate="onLoad" draw:mime-type="image/png"/>
        </draw:frame>
        <draw:frame draw:style-name="gr5" draw:text-style-name="P2" draw:layer="layout" svg:width="2.016cm" svg:height="1.872cm" svg:x="12.464cm" svg:y="24.411cm">
          <draw:image xlink:href="Pictures/100006D000000A7000000D0660D37332.svg" xlink:type="simple" xlink:show="embed" xlink:actuate="onLoad" draw:mime-type="image/svg+xml">
            <text:p/>
          </draw:image>
          <draw:image xlink:href="Pictures/10000001000000650000007EEFA02AAB.png" xlink:type="simple" xlink:show="embed" xlink:actuate="onLoad" draw:mime-type="image/png"/>
        </draw:frame>
        <draw:frame draw:style-name="gr5" draw:text-style-name="P2" draw:layer="layout" svg:width="2.016cm" svg:height="1.872cm" svg:x="14.47cm" svg:y="24.411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3BA6803A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 Goblin Appears!" svg:font-family="'A Goblin Appears!'" style:font-adornments="Regular" style:font-pitch="variable"/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style:font-name="A Goblin Appears!" fo:font-family="'A Goblin Appears!'" style:font-style-name="Regular" style:font-pitch="variable" fo:font-size="18pt"/>
    </style:style>
    <style:style style:name="Heading_20_A4" style:display-name="Heading A4" style:family="graphic" style:parent-style-name="A4">
      <style:graphic-properties draw:stroke="none"/>
      <style:text-properties style:font-name="Liberation Sans" fo:font-family="'Liberation Sans'" style:font-style-name="Bold" style:font-family-generic="swiss" style:font-pitch="variable" fo:font-size="14pt" style:text-underline-style="solid" style:text-underline-width="bold" style:text-underline-color="font-color" fo:font-weight="bold"/>
    </style:style>
    <style:style style:name="Text_20_A4" style:display-name="Text A4" style:family="graphic" style:parent-style-name="A4">
      <style:graphic-properties draw:stroke="none"/>
      <style:text-properties style:font-name="Liberation Sans1" fo:font-family="'Liberation Sans'" style:font-style-name="Regular" style:font-family-generic="swiss" style:font-pitch="variable" fo:font-size="14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te" style:family="graphic" style:parent-style-name="A4">
      <style:text-properties fo:font-size="8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13:44:09.627728025</meta:creation-date>
    <dc:date>2026-05-10T02:52:36.246940437</dc:date>
    <meta:editing-duration>PT42M26S</meta:editing-duration>
    <meta:editing-cycles>7</meta:editing-cycles>
    <meta:generator>LibreOffice/25.8.6.2$Linux_X86_64 LibreOffice_project/580$Build-2</meta:generator>
    <meta:print-date>2026-04-29T15:08:27.486306989</meta:print-date>
    <meta:printed-by>PDF files</meta:printed-by>
    <meta:document-statistic meta:object-count="66"/>
  </office:meta>
</office:document-meta>
</file>