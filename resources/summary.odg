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50000007EEFA02AAB.png" manifest:media-type="image/png"/>
  <manifest:file-entry manifest:full-path="Pictures/100000010000008400000084C74DC7A2.gif" manifest:media-type="image/gif"/>
  <manifest:file-entry manifest:full-path="Pictures/10000001000000650000007E496632EC.png" manifest:media-type="image/png"/>
  <manifest:file-entry manifest:full-path="Pictures/10000001000000650000007EF25DE3A7.png" manifest:media-type="image/png"/>
  <manifest:file-entry manifest:full-path="Pictures/1000033900000A7000000D06DC9E3C64.svg" manifest:media-type="image/svg+xml"/>
  <manifest:file-entry manifest:full-path="Pictures/10000001000000650000007E55B32220.png" manifest:media-type="image/png"/>
  <manifest:file-entry manifest:full-path="Pictures/100006D000000A7000000D0660D37332.svg" manifest:media-type="image/svg+xml"/>
  <manifest:file-entry manifest:full-path="Pictures/10000001000000650000007EEA75F999.png" manifest:media-type="image/png"/>
  <manifest:file-entry manifest:full-path="Pictures/100005AD00000A7000000D0669AB4ADA.svg" manifest:media-type="image/svg+xml"/>
  <manifest:file-entry manifest:full-path="Pictures/1000059E00000A7000000D06896E62DB.svg" manifest:media-type="image/svg+xml"/>
  <manifest:file-entry manifest:full-path="Pictures/10000001000000650000007E3BA6803A.png" manifest:media-type="image/png"/>
  <manifest:file-entry manifest:full-path="Pictures/1000061800000A7000000D06721052B5.svg" manifest:media-type="image/svg+xml"/>
  <manifest:file-entry manifest:full-path="Pictures/1000070000000A7000000D06F9745173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ommodore 64" svg:font-family="'Commodore 64'" style:font-adornments="Regular" style:font-pitch="variable" style:font-charset="x-symbol"/>
    <style:font-face style:name="FreeSans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Title_20_A4">
      <style:graphic-properties draw:textarea-horizontal-align="right" draw:auto-grow-height="true" draw:auto-grow-width="false" fo:min-height="1.588cm" fo:min-width="0cm" loext:decorative="false"/>
      <style:paragraph-properties style:writing-mode="lr-tb"/>
    </style:style>
    <style:style style:name="gr2" style:family="graphic" style:parent-style-name="note">
      <style:graphic-properties draw:textarea-horizontal-align="left" draw:auto-grow-height="true" draw:auto-grow-width="true" fo:min-height="0.391cm" fo:min-width="7.337cm" loext:decorative="false"/>
      <style:paragraph-properties style:writing-mode="lr-tb"/>
    </style:style>
    <style:style style:name="gr3" style:family="graphic" style:parent-style-name="Heading_20_A4">
      <style:graphic-properties draw:textarea-horizontal-align="left" draw:auto-grow-height="true" draw:auto-grow-width="true" fo:min-height="0.556cm" fo:min-width="5.12cm" loext:decorative="false"/>
      <style:paragraph-properties style:writing-mode="lr-tb"/>
    </style:style>
    <style:style style:name="gr4" style:family="graphic" style:parent-style-name="Text_20_A4">
      <style:graphic-properties draw:textarea-horizontal-align="left" draw:auto-grow-height="true" draw:auto-grow-width="true" fo:min-height="0.556cm" fo:min-width="6.192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52cm, 0cm)" draw:image-opacity="100%" style:mirror="none" loext:decorative="false"/>
    </style:style>
    <style:style style:name="gr6" style:family="graphic" style:parent-style-name="Heading_20_A4">
      <style:graphic-properties draw:textarea-horizontal-align="left" draw:auto-grow-height="true" draw:auto-grow-width="true" fo:min-height="0.556cm" fo:min-width="5.505cm" loext:decorative="false"/>
      <style:paragraph-properties style:writing-mode="lr-tb"/>
    </style:style>
    <style:style style:name="gr7" style:family="graphic" style:parent-style-name="Text_20_A4">
      <style:graphic-properties fo:min-height="0.556cm" loext:decorative="false"/>
      <style:paragraph-properties style:writing-mode="lr-tb"/>
    </style:style>
    <style:style style:name="gr8" style:family="graphic" style:parent-style-name="Heading_20_A4">
      <style:graphic-properties draw:textarea-horizontal-align="left" draw:auto-grow-height="true" draw:auto-grow-width="true" fo:min-height="0.556cm" fo:min-width="5.892cm" loext:decorative="false"/>
      <style:paragraph-properties style:writing-mode="lr-tb"/>
    </style:style>
    <style:style style:name="gr9" style:family="graphic" style:parent-style-name="Text_20_A4">
      <style:graphic-properties draw:textarea-horizontal-align="left" draw:auto-grow-height="true" draw:auto-grow-width="true" fo:min-height="0.556cm" fo:min-width="4.183cm" loext:decorative="false"/>
      <style:paragraph-properties style:writing-mode="lr-tb"/>
    </style:style>
    <style:style style:name="gr10" style:family="graphic" style:parent-style-name="Heading_20_A4">
      <style:graphic-properties draw:textarea-horizontal-align="left" draw:auto-grow-height="true" draw:auto-grow-width="true" fo:min-height="0.556cm" fo:min-width="4.737cm" loext:decorative="false"/>
      <style:paragraph-properties style:writing-mode="lr-tb"/>
    </style:style>
    <style:style style:name="gr11" style:family="graphic" style:parent-style-name="Text_20_A4">
      <style:graphic-properties draw:textarea-horizontal-align="left" draw:auto-grow-height="true" draw:auto-grow-width="true" fo:min-height="0.556cm" fo:min-width="3.99cm" loext:decorative="false"/>
      <style:paragraph-properties style:writing-mode="lr-tb"/>
    </style:style>
    <style:style style:name="gr12" style:family="graphic" style:parent-style-name="Heading_20_A4">
      <style:graphic-properties draw:textarea-horizontal-align="left" draw:auto-grow-height="true" draw:auto-grow-width="true" fo:min-height="0.556cm" fo:min-width="3.606cm" loext:decorative="false"/>
      <style:paragraph-properties style:writing-mode="lr-tb"/>
    </style:style>
    <style:style style:name="gr13" style:family="graphic" style:parent-style-name="Text_20_A4">
      <style:graphic-properties draw:textarea-horizontal-align="left" draw:auto-grow-height="true" draw:auto-grow-width="true" fo:min-height="0.556cm" fo:min-width="0.687cm" loext:decorative="false"/>
      <style:paragraph-properties style:writing-mode="lr-tb"/>
    </style:style>
    <style:style style:name="gr14" style:family="graphic" style:parent-style-name="note">
      <style:graphic-properties draw:textarea-horizontal-align="left" draw:auto-grow-height="true" draw:auto-grow-width="true" fo:min-height="0.391cm" fo:min-width="2.007cm" loext:decorative="false"/>
      <style:paragraph-properties style:writing-mode="lr-tb"/>
    </style:style>
    <style:style style:name="gr15" style:family="graphic" style:parent-style-name="Title_20_A4">
      <style:graphic-properties draw:textarea-horizontal-align="left" draw:auto-grow-height="true" draw:auto-grow-width="true" fo:min-height="0.865cm" fo:min-width="3.309cm" loext:decorative="false"/>
      <style:paragraph-properties style:writing-mode="lr-tb"/>
    </style:style>
    <style:style style:name="gr16" style:family="graphic" style:parent-style-name="Heading_20_A4">
      <style:graphic-properties draw:textarea-horizontal-align="left" draw:auto-grow-height="true" draw:auto-grow-width="true" fo:min-height="0.556cm" fo:min-width="1.379cm" loext:decorative="false"/>
      <style:paragraph-properties style:writing-mode="lr-tb"/>
    </style:style>
    <style:style style:name="gr17" style:family="graphic" style:parent-style-name="Heading_20_A4">
      <style:graphic-properties draw:textarea-horizontal-align="left" draw:auto-grow-height="true" draw:auto-grow-width="true" fo:min-height="0.556cm" fo:min-width="3.196cm" loext:decorative="false"/>
      <style:paragraph-properties style:writing-mode="lr-tb"/>
    </style:style>
    <style:style style:name="gr18" style:family="graphic" style:parent-style-name="Text_20_A4">
      <style:graphic-properties draw:textarea-horizontal-align="left" draw:auto-grow-height="true" draw:auto-grow-width="true" fo:min-height="0.556cm" fo:min-width="4.903cm" loext:decorative="false"/>
      <style:paragraph-properties style:writing-mode="lr-tb"/>
    </style:style>
    <style:style style:name="gr19" style:family="graphic" style:parent-style-name="Heading_20_A4">
      <style:graphic-properties draw:textarea-horizontal-align="left" draw:auto-grow-height="true" draw:auto-grow-width="true" fo:min-height="0.556cm" fo:min-width="1.763cm" loext:decorative="false"/>
      <style:paragraph-properties style:writing-mode="lr-tb"/>
    </style:style>
    <style:style style:name="gr20" style:family="graphic" style:parent-style-name="Text_20_A4">
      <style:graphic-properties draw:textarea-horizontal-align="left" draw:auto-grow-height="true" draw:auto-grow-width="true" fo:min-height="0.556cm" fo:min-width="6.115cm" loext:decorative="false"/>
      <style:paragraph-properties style:writing-mode="lr-tb"/>
    </style:style>
    <style:style style:name="gr21" style:family="graphic" style:parent-style-name="Heading_20_A4">
      <style:graphic-properties draw:textarea-horizontal-align="left" draw:auto-grow-height="true" draw:auto-grow-width="true" fo:min-height="0.556cm" fo:min-width="3.525cm" loext:decorative="false"/>
      <style:paragraph-properties style:writing-mode="lr-tb"/>
    </style:style>
    <style:style style:name="gr22" style:family="graphic" style:parent-style-name="Text_20_A4">
      <style:graphic-properties draw:textarea-horizontal-align="left" draw:auto-grow-height="true" draw:auto-grow-width="true" fo:min-height="0.556cm" fo:min-width="5.7cm" loext:decorative="false"/>
      <style:paragraph-properties style:writing-mode="lr-tb"/>
    </style:style>
    <style:style style:name="gr23" style:family="graphic" style:parent-style-name="Heading_20_A4">
      <style:graphic-properties draw:textarea-horizontal-align="left" draw:auto-grow-height="true" draw:auto-grow-width="true" fo:min-height="0.556cm" fo:min-width="1.516cm" loext:decorative="false"/>
      <style:paragraph-properties style:writing-mode="lr-tb"/>
    </style:style>
    <style:style style:name="gr24" style:family="graphic" style:parent-style-name="Text_20_A4">
      <style:graphic-properties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25" style:family="graphic" style:parent-style-name="Heading_20_A4">
      <style:graphic-properties draw:textarea-horizontal-align="left" draw:auto-grow-height="true" draw:auto-grow-width="true" fo:min-height="0.556cm" fo:min-width="5.231cm" loext:decorative="false"/>
      <style:paragraph-properties style:writing-mode="lr-tb"/>
    </style:style>
    <style:style style:name="gr26" style:family="graphic" style:parent-style-name="Text_20_A4">
      <style:graphic-properties draw:textarea-horizontal-align="left" draw:auto-grow-height="true" draw:auto-grow-width="false" fo:min-height="0.547cm" fo:min-width="0cm" loext:decorative="false"/>
      <style:paragraph-properties style:writing-mode="lr-tb"/>
    </style:style>
    <style:style style:name="gr27" style:family="graphic" style:parent-style-name="note">
      <style:graphic-properties draw:textarea-horizontal-align="left" draw:auto-grow-height="true" draw:auto-grow-width="false" fo:min-height="1.171cm" fo:min-width="0cm" loext:decorative="false"/>
      <style:paragraph-properties style:writing-mode="lr-tb"/>
    </style:style>
    <style:style style:name="gr28" style:family="graphic" style:parent-style-name="Heading_20_A4">
      <style:graphic-properties draw:textarea-horizontal-align="left" draw:auto-grow-height="true" draw:auto-grow-width="true" fo:min-height="0.556cm" fo:min-width="2.754cm" loext:decorative="false"/>
      <style:paragraph-properties style:writing-mode="lr-tb"/>
    </style:style>
    <style:style style:name="gr29" style:family="graphic" style:parent-style-name="Text_20_A4">
      <style:graphic-properties draw:textarea-horizontal-align="left" draw:auto-grow-height="true" draw:auto-grow-width="true" fo:min-height="0.547cm" fo:min-width="5.3cm" loext:decorative="false"/>
      <style:paragraph-properties style:writing-mode="lr-tb"/>
    </style:style>
    <style:style style:name="gr30" style:family="graphic" style:parent-style-name="Title_20_A4">
      <style:graphic-properties draw:textarea-horizontal-align="left" draw:auto-grow-height="true" draw:auto-grow-width="false" fo:min-height="1.271cm" fo:min-width="0cm" loext:decorative="false"/>
      <style:paragraph-properties style:writing-mode="lr-tb"/>
    </style:style>
    <style:style style:name="gr31" style:family="graphic" style:parent-style-name="Heading_20_A4">
      <style:graphic-properties draw:textarea-horizontal-align="left" draw:auto-grow-height="true" draw:auto-grow-width="true" fo:min-height="0.556cm" fo:min-width="2.423cm" loext:decorative="false"/>
      <style:paragraph-properties style:writing-mode="lr-tb"/>
    </style:style>
    <style:style style:name="gr32" style:family="graphic" style:parent-style-name="Text_20_A4" style:list-style-name="L2">
      <style:graphic-properties fo:min-height="4.996cm" loext:decorative="false"/>
      <style:paragraph-properties style:writing-mode="lr-tb"/>
    </style:style>
    <style:style style:name="gr33" style:family="graphic" style:parent-style-name="Heading_20_A4">
      <style:graphic-properties draw:textarea-horizontal-align="left" draw:auto-grow-height="true" draw:auto-grow-width="true" fo:min-height="0.556cm" fo:min-width="1.846cm" loext:decorative="false"/>
      <style:paragraph-properties style:writing-mode="lr-tb"/>
    </style:style>
    <style:style style:name="gr34" style:family="graphic" style:parent-style-name="Text_20_A4" style:list-style-name="L2">
      <style:graphic-properties fo:min-height="5.551cm" loext:decorative="false"/>
      <style:paragraph-properties style:writing-mode="lr-tb"/>
    </style:style>
    <style:style style:name="gr35" style:family="graphic" style:parent-style-name="Text_20_A4">
      <style:graphic-properties fo:min-height="17.818cm" loext:decorative="false"/>
      <style:paragraph-properties style:writing-mode="lr-tb"/>
    </style:style>
    <style:style style:name="gr36" style:family="graphic" style:parent-style-name="Title_20_A4">
      <style:graphic-properties draw:textarea-horizontal-align="right" draw:auto-grow-height="true" draw:auto-grow-width="true" fo:min-height="0.865cm" fo:min-width="2.905cm" loext:decorative="false"/>
      <style:paragraph-properties style:writing-mode="lr-tb"/>
    </style:style>
    <style:style style:name="gr37" style:family="graphic" style:parent-style-name="note">
      <style:graphic-properties fo:min-height="1.171cm" loext:decorative="false"/>
      <style:paragraph-properties style:writing-mode="lr-tb"/>
    </style:style>
    <style:style style:name="gr38" style:family="graphic" style:parent-style-name="Text_20_A4">
      <style:graphic-properties draw:textarea-horizontal-align="left" draw:auto-grow-height="true" draw:auto-grow-width="false" fo:min-height="1.905cm" fo:min-width="0cm" loext:decorative="false"/>
      <style:paragraph-properties style:writing-mode="lr-tb"/>
    </style:style>
    <style:style style:name="gr39" style:family="graphic" style:parent-style-name="note">
      <style:graphic-properties draw:textarea-horizontal-align="left" draw:auto-grow-height="true" draw:auto-grow-width="true" fo:min-height="0.391cm" fo:min-width="7.236cm" loext:decorative="false"/>
      <style:paragraph-properties style:writing-mode="lr-tb"/>
    </style:style>
    <style:style style:name="gr40" style:family="graphic" style:parent-style-name="Text_20_A4">
      <style:graphic-properties fo:min-height="18.295cm" loext:decorative="false"/>
      <style:paragraph-properties style:writing-mode="lr-tb"/>
    </style:style>
    <style:style style:name="gr4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2" style:family="graphic" style:parent-style-name="note">
      <style:graphic-properties draw:textarea-horizontal-align="left" draw:auto-grow-height="true" draw:auto-grow-width="true" fo:min-height="0.956cm" fo:min-width="3.175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tyle="normal"/>
    </style:style>
    <style:style style:name="P4" style:family="paragraph">
      <style:paragraph-properties fo:margin-top="0cm" fo:margin-bottom="0.102cm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tyle="normal" style:text-underline-style="solid" style:text-underline-width="auto" style:text-underline-color="font-color"/>
    </style:style>
    <style:style style:name="P7" style:family="paragraph">
      <style:paragraph-properties fo:text-align="center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fo:font-style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2" fo:font-size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993cm" svg:height="1.588cm" svg:x="1.452cm" svg:y="1.317cm">
          <draw:text-box>
            <text:p text:style-name="P1">Rolls</text:p>
          </draw:text-box>
        </draw:frame>
        <draw:frame draw:style-name="gr2" draw:layer="layout" svg:width="7.337cm" svg:height="0.391cm" svg:x="1.023cm" svg:y="26.655cm">
          <draw:text-box>
            <text:p>d4, d6, d8, d10, d12, d20 by Lonnie Tapscott (CC BY 3.0)</text:p>
          </draw:text-box>
        </draw:frame>
        <draw:frame draw:style-name="gr3" draw:layer="layout" svg:width="5.12cm" svg:height="0.556cm" svg:x="1.635cm" svg:y="2.149cm">
          <draw:text-box>
            <text:p>Attack (attempt to hit)</text:p>
          </draw:text-box>
        </draw:frame>
        <draw:frame draw:style-name="gr4" draw:layer="layout" svg:width="6.192cm" svg:height="0.556cm" svg:x="1.158cm" svg:y="3.34cm">
          <draw:text-box>
            <text:p>your AV - <text:s text:c="13"/><text:span text:style-name="T1">≤</text:span> their AC</text:p>
          </draw:text-box>
        </draw:frame>
        <draw:frame draw:style-name="gr5" draw:text-style-name="P2" draw:layer="layout" svg:width="1.987cm" svg:height="1.845cm" svg:x="3.14cm" svg:y="2.705cm">
          <draw:image xlink:href="Pictures/1000070000000A7000000D06F9745173.svg" xlink:type="simple" xlink:show="embed" xlink:actuate="onLoad" draw:mime-type="image/svg+xml">
            <text:p/>
          </draw:image>
          <draw:image xlink:href="Pictures/10000001000000650000007E3BA6803A.png" xlink:type="simple" xlink:show="embed" xlink:actuate="onLoad" draw:mime-type="image/png"/>
        </draw:frame>
        <draw:frame draw:style-name="gr6" draw:layer="layout" svg:width="5.505cm" svg:height="0.556cm" svg:x="1.635cm" svg:y="4.489cm">
          <draw:text-box>
            <text:p>Dodge (avoid being hit)</text:p>
          </draw:text-box>
        </draw:frame>
        <draw:frame draw:style-name="gr7" draw:layer="layout" svg:width="5.053cm" svg:height="0.556cm" svg:x="2.932cm" svg:y="5.597cm">
          <draw:text-box>
            <text:p>+ your AC ≤ their AV</text:p>
          </draw:text-box>
        </draw:frame>
        <draw:frame draw:style-name="gr5" draw:text-style-name="P2" draw:layer="layout" svg:width="1.987cm" svg:height="1.845cm" svg:x="1cm" svg:y="4.962cm">
          <draw:image xlink:href="Pictures/1000070000000A7000000D06F9745173.svg" xlink:type="simple" xlink:show="embed" xlink:actuate="onLoad" draw:mime-type="image/svg+xml">
            <text:p/>
          </draw:image>
          <draw:image xlink:href="Pictures/10000001000000650000007E3BA6803A.png" xlink:type="simple" xlink:show="embed" xlink:actuate="onLoad" draw:mime-type="image/png"/>
        </draw:frame>
        <draw:frame draw:style-name="gr8" draw:layer="layout" svg:width="5.892cm" svg:height="0.556cm" svg:x="1.635cm" svg:y="6.946cm">
          <draw:text-box>
            <text:p>Ability (str, dex, con, etc)</text:p>
          </draw:text-box>
        </draw:frame>
        <draw:frame draw:style-name="gr9" draw:layer="layout" svg:width="4.183cm" svg:height="0.556cm" svg:x="2.905cm" svg:y="8.137cm">
          <draw:text-box>
            <text:p><text:span text:style-name="T1">≤</text:span> your Ability score</text:p>
          </draw:text-box>
        </draw:frame>
        <draw:frame draw:style-name="gr5" draw:text-style-name="P2" draw:layer="layout" svg:width="1.987cm" svg:height="1.845cm" svg:x="1cm" svg:y="7.562cm">
          <draw:image xlink:href="Pictures/1000070000000A7000000D06F9745173.svg" xlink:type="simple" xlink:show="embed" xlink:actuate="onLoad" draw:mime-type="image/svg+xml">
            <text:p/>
          </draw:image>
          <draw:image xlink:href="Pictures/10000001000000650000007E3BA6803A.png" xlink:type="simple" xlink:show="embed" xlink:actuate="onLoad" draw:mime-type="image/png"/>
        </draw:frame>
        <draw:frame draw:style-name="gr10" draw:layer="layout" svg:width="5.81cm" svg:height="0.556cm" svg:x="1.635cm" svg:y="9.486cm">
          <draw:text-box>
            <text:p>Save (physical or magic)</text:p>
          </draw:text-box>
        </draw:frame>
        <draw:frame draw:style-name="gr11" draw:layer="layout" svg:width="3.99cm" svg:height="0.556cm" svg:x="3.042cm" svg:y="10.556cm">
          <draw:text-box>
            <text:p><text:span text:style-name="T1">≤</text:span> your Save score</text:p>
          </draw:text-box>
        </draw:frame>
        <draw:frame draw:style-name="gr5" draw:text-style-name="P2" draw:layer="layout" svg:width="1.987cm" svg:height="1.845cm" svg:x="1cm" svg:y="10.002cm">
          <draw:image xlink:href="Pictures/1000070000000A7000000D06F9745173.svg" xlink:type="simple" xlink:show="embed" xlink:actuate="onLoad" draw:mime-type="image/svg+xml">
            <text:p/>
          </draw:image>
          <draw:image xlink:href="Pictures/10000001000000650000007E3BA6803A.png" xlink:type="simple" xlink:show="embed" xlink:actuate="onLoad" draw:mime-type="image/png"/>
        </draw:frame>
        <draw:frame draw:style-name="gr12" draw:layer="layout" svg:width="3.606cm" svg:height="0.556cm" svg:x="1.635cm" svg:y="11.865cm">
          <draw:text-box>
            <text:p>Listen (at door)</text:p>
          </draw:text-box>
        </draw:frame>
        <draw:frame draw:style-name="gr13" draw:layer="layout" svg:width="0.687cm" svg:height="0.556cm" svg:x="2.905cm" svg:y="12.935cm">
          <draw:text-box>
            <text:p><text:span text:style-name="T1">≥</text:span> 6</text:p>
          </draw:text-box>
        </draw:frame>
        <draw:frame draw:style-name="gr5" draw:text-style-name="P2" draw:layer="layout" svg:width="1.987cm" svg:height="1.845cm" svg:x="0.918cm" svg:y="12.36cm">
          <draw:image xlink:href="Pictures/100005AD00000A7000000D0669AB4ADA.svg" xlink:type="simple" xlink:show="embed" xlink:actuate="onLoad" draw:mime-type="image/svg+xml">
            <text:p/>
          </draw:image>
          <draw:image xlink:href="Pictures/10000001000000650000007E55B32220.png" xlink:type="simple" xlink:show="embed" xlink:actuate="onLoad" draw:mime-type="image/png"/>
        </draw:frame>
        <draw:frame draw:style-name="gr14" draw:text-style-name="P3" draw:layer="layout" svg:width="2.007cm" svg:height="0.391cm" svg:x="2.699cm" svg:y="13.887cm">
          <draw:text-box>
            <text:p><text:span text:style-name="T2">+ Bonus if thief</text:span></text:p>
          </draw:text-box>
        </draw:frame>
        <draw:frame draw:style-name="gr15" draw:text-style-name="P3" draw:layer="layout" svg:width="3.309cm" svg:height="0.865cm" svg:x="5.78cm" svg:y="19.832cm">
          <draw:text-box>
            <text:p><text:span text:style-name="T2">Roles</text:span></text:p>
          </draw:text-box>
        </draw:frame>
        <draw:frame draw:style-name="gr16" draw:text-style-name="P3" draw:layer="layout" svg:width="1.379cm" svg:height="0.556cm" svg:x="8.176cm" svg:y="20.685cm">
          <draw:text-box>
            <text:p><text:span text:style-name="T2">Caller</text:span></text:p>
          </draw:text-box>
        </draw:frame>
        <draw:frame draw:style-name="gr7" draw:layer="layout" svg:width="6.258cm" svg:height="0.556cm" svg:x="7.6cm" svg:y="21.402cm">
          <draw:text-box>
            <text:p>Direct party, get consensus</text:p>
          </draw:text-box>
        </draw:frame>
        <draw:frame draw:style-name="gr17" draw:text-style-name="P3" draw:layer="layout" svg:width="3.196cm" svg:height="0.556cm" svg:x="8.146cm" svg:y="22.046cm">
          <draw:text-box>
            <text:p><text:span text:style-name="T2">Score Keeper</text:span></text:p>
          </draw:text-box>
        </draw:frame>
        <draw:frame draw:style-name="gr18" draw:text-style-name="P3" draw:layer="layout" svg:width="4.903cm" svg:height="0.556cm" svg:x="7.667cm" svg:y="22.602cm">
          <draw:text-box>
            <text:p><text:span text:style-name="T2">Note treasure, and XP</text:span></text:p>
          </draw:text-box>
        </draw:frame>
        <draw:frame draw:style-name="gr19" draw:text-style-name="P3" draw:layer="layout" svg:width="1.763cm" svg:height="0.556cm" svg:x="1.635cm" svg:y="21.816cm">
          <draw:text-box>
            <text:p><text:span text:style-name="T2">Mapper</text:span></text:p>
          </draw:text-box>
        </draw:frame>
        <draw:frame draw:style-name="gr20" draw:text-style-name="P3" draw:layer="layout" svg:width="6.115cm" svg:height="0.556cm" svg:x="1cm" svg:y="22.451cm">
          <draw:text-box>
            <text:p><text:span text:style-name="T2">Track dungeon and location</text:span></text:p>
          </draw:text-box>
        </draw:frame>
        <draw:frame draw:style-name="gr21" draw:text-style-name="P3" draw:layer="layout" svg:width="3.525cm" svg:height="0.556cm" svg:x="8.135cm" svg:y="23.316cm">
          <draw:text-box>
            <text:p><text:span text:style-name="T2">Quarter Master</text:span></text:p>
          </draw:text-box>
        </draw:frame>
        <draw:frame draw:style-name="gr22" draw:text-style-name="P3" draw:layer="layout" svg:width="5.7cm" svg:height="0.556cm" svg:x="7.667cm" svg:y="23.951cm">
          <draw:text-box>
            <text:p><text:span text:style-name="T2">Track torches, rations, etc</text:span></text:p>
          </draw:text-box>
        </draw:frame>
        <draw:frame draw:style-name="gr23" draw:text-style-name="P3" draw:layer="layout" svg:width="1.516cm" svg:height="0.556cm" svg:x="1.706cm" svg:y="22.986cm">
          <draw:text-box>
            <text:p><text:span text:style-name="T2">Scribe</text:span></text:p>
          </draw:text-box>
        </draw:frame>
        <draw:frame draw:style-name="gr24" draw:text-style-name="P3" draw:layer="layout" svg:width="6.667cm" svg:height="1.111cm" svg:x="1cm" svg:y="23.621cm">
          <draw:text-box>
            <text:p><text:span text:style-name="T2">Keep track of monster behavior and statistics</text:span></text:p>
          </draw:text-box>
        </draw:frame>
        <draw:frame draw:style-name="gr25" draw:layer="layout" svg:width="5.231cm" svg:height="0.556cm" svg:x="1.635cm" svg:y="14.322cm">
          <draw:text-box>
            <text:p>Turn <text:s/>Undead (clerics)</text:p>
          </draw:text-box>
        </draw:frame>
        <draw:frame draw:style-name="gr26" draw:layer="layout" svg:width="2.819cm" svg:height="0.547cm" svg:x="4.492cm" svg:y="15.163cm">
          <draw:text-box>
            <text:p><text:span text:style-name="T1">≥ lookup(HD)</text:span></text:p>
          </draw:text-box>
        </draw:frame>
        <draw:frame draw:style-name="gr5" draw:text-style-name="P2" draw:layer="layout" svg:width="1.987cm" svg:height="1.845cm" svg:x="0.919cm" svg:y="14.975cm">
          <draw:image xlink:href="Pictures/100005AD00000A7000000D0669AB4ADA.svg" xlink:type="simple" xlink:show="embed" xlink:actuate="onLoad" draw:mime-type="image/svg+xml">
            <text:p/>
          </draw:image>
          <draw:image xlink:href="Pictures/10000001000000650000007E55B32220.png" xlink:type="simple" xlink:show="embed" xlink:actuate="onLoad" draw:mime-type="image/png"/>
        </draw:frame>
        <draw:frame draw:style-name="gr5" draw:text-style-name="P2" draw:layer="layout" svg:width="1.987cm" svg:height="1.845cm" svg:x="2.505cm" svg:y="14.957cm">
          <draw:image xlink:href="Pictures/100005AD00000A7000000D0669AB4ADA.svg" xlink:type="simple" xlink:show="embed" xlink:actuate="onLoad" draw:mime-type="image/svg+xml">
            <text:p/>
          </draw:image>
          <draw:image xlink:href="Pictures/10000001000000650000007E55B32220.png" xlink:type="simple" xlink:show="embed" xlink:actuate="onLoad" draw:mime-type="image/png"/>
        </draw:frame>
        <draw:frame draw:style-name="gr27" draw:text-style-name="P3" draw:layer="layout" svg:width="2.54cm" svg:height="1.171cm" svg:x="4.492cm" svg:y="15.785cm">
          <draw:text-box>
            <text:p><text:span text:style-name="T2">Then turn/destroy </text:span><text:span text:style-name="T2"><text:tab/></text:span><text:span text:style-name="T2"> <text:s text:c="11"/></text:span></text:p>
          </draw:text-box>
        </draw:frame>
        <draw:frame draw:style-name="gr5" draw:text-style-name="P2" draw:layer="layout" svg:width="0.97cm" svg:height="0.901cm" svg:x="5.109cm" svg:y="16.095cm">
          <draw:image xlink:href="Pictures/100005AD00000A7000000D0669AB4ADA.svg" xlink:type="simple" xlink:show="embed" xlink:actuate="onLoad" draw:mime-type="image/svg+xml">
            <text:p/>
          </draw:image>
          <draw:image xlink:href="Pictures/10000001000000650000007E55B32220.png" xlink:type="simple" xlink:show="embed" xlink:actuate="onLoad" draw:mime-type="image/png"/>
        </draw:frame>
        <draw:frame draw:style-name="gr5" draw:text-style-name="P2" draw:layer="layout" svg:width="0.97cm" svg:height="0.9cm" svg:x="5.91cm" svg:y="16.104cm">
          <draw:image xlink:href="Pictures/100005AD00000A7000000D0669AB4ADA.svg" xlink:type="simple" xlink:show="embed" xlink:actuate="onLoad" draw:mime-type="image/svg+xml">
            <text:p/>
          </draw:image>
          <draw:image xlink:href="Pictures/10000001000000650000007E55B32220.png" xlink:type="simple" xlink:show="embed" xlink:actuate="onLoad" draw:mime-type="image/png"/>
        </draw:frame>
        <draw:frame draw:style-name="gr28" draw:layer="layout" svg:width="2.754cm" svg:height="0.556cm" svg:x="1.635cm" svg:y="17.615cm">
          <draw:text-box>
            <text:p>Thief Skills </text:p>
          </draw:text-box>
        </draw:frame>
        <draw:frame draw:style-name="gr29" draw:layer="layout" svg:width="5.3cm" svg:height="0.547cm" svg:x="2.905cm" svg:y="18.773cm">
          <draw:text-box>
            <text:p><text:span text:style-name="T1">x10 + <text:s text:c="13"/>≤ skill score</text:span></text:p>
          </draw:text-box>
        </draw:frame>
        <draw:frame draw:style-name="gr5" draw:text-style-name="P2" draw:layer="layout" svg:width="1.987cm" svg:height="1.845cm" svg:x="1cm" svg:y="18.11cm">
          <draw:image xlink:href="Pictures/1000059E00000A7000000D06896E62DB.svg" xlink:type="simple" xlink:show="embed" xlink:actuate="onLoad" draw:mime-type="image/svg+xml">
            <text:p/>
          </draw:image>
          <draw:image xlink:href="Pictures/10000001000000650000007EEA75F999.png" xlink:type="simple" xlink:show="embed" xlink:actuate="onLoad" draw:mime-type="image/png"/>
        </draw:frame>
        <draw:frame draw:style-name="gr5" draw:text-style-name="P2" draw:layer="layout" svg:width="1.987cm" svg:height="1.845cm" svg:x="3.838cm" svg:y="18.085cm">
          <draw:image xlink:href="Pictures/1000059E00000A7000000D06896E62DB.svg" xlink:type="simple" xlink:show="embed" xlink:actuate="onLoad" draw:mime-type="image/svg+xml">
            <text:p/>
          </draw:image>
          <draw:image xlink:href="Pictures/10000001000000650000007EEA75F999.png" xlink:type="simple" xlink:show="embed" xlink:actuate="onLoad" draw:mime-type="image/png"/>
        </draw:frame>
        <draw:frame draw:style-name="gr30" draw:text-style-name="P3" draw:layer="layout" svg:width="5.08cm" svg:height="1.271cm" svg:x="9.07cm" svg:y="1.317cm">
          <draw:text-box>
            <text:p><text:span text:style-name="T2">Rules</text:span></text:p>
          </draw:text-box>
        </draw:frame>
        <draw:frame draw:style-name="gr31" draw:text-style-name="P3" draw:layer="layout" svg:width="2.423cm" svg:height="0.556cm" svg:x="7.8cm" svg:y="2.02cm">
          <draw:text-box>
            <text:p><text:span text:style-name="T2">Dungeons</text:span></text:p>
          </draw:text-box>
        </draw:frame>
        <draw:frame draw:style-name="gr32" draw:layer="layout" svg:width="5.519cm" svg:height="6.106cm" svg:x="7.863cm" svg:y="2.656cm">
          <draw:text-box>
            <text:list text:style-name="L2">
              <text:list-item>
                <text:p>Each turn there are random hazards. Each activity takes one turn.</text:p>
              </text:list-item>
              <text:list-item>
                <text:p>Open door quietly with a strength check. Alternatively, charge in.</text:p>
              </text:list-item>
              <text:list-item>
                <text:p>Monsters make reaction rolls</text:p>
              </text:list-item>
              <text:list-item>
                <text:p>Search for secrets.</text:p>
              </text:list-item>
            </text:list>
          </draw:text-box>
        </draw:frame>
        <draw:frame draw:style-name="gr33" draw:text-style-name="P3" draw:layer="layout" svg:width="1.846cm" svg:height="0.556cm" svg:x="7.885cm" svg:y="8.852cm">
          <draw:text-box>
            <text:p><text:span text:style-name="T2">Combat</text:span></text:p>
          </draw:text-box>
        </draw:frame>
        <draw:frame draw:style-name="gr34" draw:layer="layout" svg:width="5.476cm" svg:height="7.771cm" svg:x="7.906cm" svg:y="9.562cm">
          <draw:text-box>
            <text:list text:style-name="L2">
              <text:list-item>
                <text:p>Decide who goes first each round: players d6 vs monsters d6.</text:p>
              </text:list-item>
              <text:list-item>
                <text:p>One action each round.</text:p>
              </text:list-item>
              <text:list-item>
                <text:p>Actions: Move+attack, run, focus, magic, ready, stunts.</text:p>
              </text:list-item>
              <text:list-item>
                <text:p>Subdue with blunt weapons.</text:p>
              </text:list-item>
              <text:list-item>
                <text:p>Moral checks on: first death, leader death, half group, half health.</text:p>
              </text:list-item>
            </text:list>
          </draw:text-box>
        </draw:frame>
        <draw:frame draw:style-name="gr35" draw:text-style-name="P4" draw:layer="layout" svg:width="6.022cm" svg:height="17.818cm" svg:x="13.778cm" svg:y="2.07cm">
          <draw:text-box>
            <text:p text:style-name="P4"><text:span text:style-name="T3">How much do rations cost? </text:span><text:span text:style-name="T3"><text:tab/></text:span><text:span text:style-name="T4">1cp. </text:span></text:p>
            <text:p text:style-name="P4"><text:span text:style-name="T3">How many item slots do I have?</text:span><text:span text:style-name="T3"><text:tab/></text:span>Depends on con: 8 is 9 slots, 9-12 is 10. 13 is 11.</text:p>
            <text:p text:style-name="P4"><text:span text:style-name="T3">How to get more slots?</text:span><text:span text:style-name="T3"><text:tab/></text:span><text:span text:style-name="T3"><text:tab/></text:span><text:span text:style-name="T4">B</text:span>uy a chest, hire a lackey get a cart</text:p>
            <text:p text:style-name="P4"><text:span text:style-name="T3">Whats the range of my spell?</text:span><text:span text:style-name="T3"><text:tab/></text:span><text:span text:style-name="T4">Unless specified otherwise, it’s close (same or an adjacent zone.)</text:span></text:p>
            <text:p text:style-name="P4"><text:span text:style-name="T3">How to get un-poisoned?</text:span><text:span text:style-name="T3"><text:tab/></text:span>Antidote can cure many poisons. The spell remove poison can heal most others. Poison is meant to be lethal</text:p>
            <text:p text:style-name="P4"><text:span text:style-name="T3">How much HP do I have?</text:span><text:span text:style-name="T3"><text:tab/></text:span><text:span text:style-name="T4">Depends on class: fighters 8, clerics 6, thieves and wizards 4.</text:span></text:p>
            <text:p text:style-name="P4"><text:span text:style-name="T3">What happens when damage exceeds my HP?</text:span><text:span text:style-name="T3"><text:tab/></text:span><text:span text:style-name="T5">You are “near death.” Any further damage you must dismember, and risk death. when you are healed, you will dismember a final time.</text:span></text:p>
          </draw:text-box>
        </draw:frame>
        <draw:frame draw:style-name="gr36" draw:text-style-name="P1" draw:layer="layout" svg:width="2.905cm" svg:height="0.865cm" svg:x="14.12cm" svg:y="1.317cm">
          <draw:text-box>
            <text:p text:style-name="P1">FAQs</text:p>
          </draw:text-box>
        </draw:frame>
        <draw:frame draw:style-name="gr37" draw:text-style-name="P6" draw:layer="layout" svg:width="2.858cm" svg:height="1.171cm" svg:x="4.492cm" svg:y="16.992cm">
          <draw:text-box>
            <text:p text:style-name="P5"><text:span text:style-name="T2">HD worth of undead, weakest first.</text:span></text:p>
          </draw:text-box>
        </draw:frame>
        <draw:frame draw:style-name="gr38" draw:text-style-name="P3" draw:layer="layout" svg:width="6.75cm" svg:height="1.905cm" svg:x="0.917cm" svg:y="20.702cm">
          <draw:text-box>
            <text:p><text:span text:style-name="T2">Score 50xp for each role announced in town</text:span></text:p>
          </draw:text-box>
        </draw:frame>
        <draw:frame draw:style-name="gr39" draw:layer="layout" svg:width="7.236cm" svg:height="0.391cm" svg:x="13.435cm" svg:y="26.655cm">
          <draw:text-box>
            <text:p>For reference only. Appeal to source books for rulings.</text:p>
          </draw:text-box>
        </draw:frame>
        <draw:frame draw:style-name="gr5" draw:text-style-name="P2" draw:layer="layout" svg:width="2.016cm" svg:height="1.873cm" svg:x="4.912cm" svg:y="24.609cm">
          <draw:image xlink:href="Pictures/1000033900000A7000000D06DC9E3C64.svg" xlink:type="simple" xlink:show="embed" xlink:actuate="onLoad" draw:mime-type="image/svg+xml">
            <text:p/>
          </draw:image>
          <draw:image xlink:href="Pictures/10000001000000650000007EF25DE3A7.png" xlink:type="simple" xlink:show="embed" xlink:actuate="onLoad" draw:mime-type="image/png"/>
        </draw:frame>
        <draw:frame draw:style-name="gr5" draw:text-style-name="P2" draw:layer="layout" svg:width="2.016cm" svg:height="1.873cm" svg:x="8.611cm" svg:y="24.609cm">
          <draw:image xlink:href="Pictures/1000061800000A7000000D06721052B5.svg" xlink:type="simple" xlink:show="embed" xlink:actuate="onLoad" draw:mime-type="image/svg+xml">
            <text:p/>
          </draw:image>
          <draw:image xlink:href="Pictures/10000001000000650000007E496632EC.png" xlink:type="simple" xlink:show="embed" xlink:actuate="onLoad" draw:mime-type="image/png"/>
        </draw:frame>
        <draw:frame draw:style-name="gr5" draw:text-style-name="P2" draw:layer="layout" svg:width="2.016cm" svg:height="1.872cm" svg:x="6.683cm" svg:y="24.611cm">
          <draw:image xlink:href="Pictures/100005AD00000A7000000D0669AB4ADA.svg" xlink:type="simple" xlink:show="embed" xlink:actuate="onLoad" draw:mime-type="image/svg+xml">
            <text:p/>
          </draw:image>
          <draw:image xlink:href="Pictures/10000001000000650000007E55B32220.png" xlink:type="simple" xlink:show="embed" xlink:actuate="onLoad" draw:mime-type="image/png"/>
        </draw:frame>
        <draw:frame draw:style-name="gr5" draw:text-style-name="P2" draw:layer="layout" svg:width="2.017cm" svg:height="1.872cm" svg:x="10.576cm" svg:y="24.611cm">
          <draw:image xlink:href="Pictures/1000059E00000A7000000D06896E62DB.svg" xlink:type="simple" xlink:show="embed" xlink:actuate="onLoad" draw:mime-type="image/svg+xml">
            <text:p/>
          </draw:image>
          <draw:image xlink:href="Pictures/10000001000000650000007EEA75F999.png" xlink:type="simple" xlink:show="embed" xlink:actuate="onLoad" draw:mime-type="image/png"/>
        </draw:frame>
        <draw:frame draw:style-name="gr5" draw:text-style-name="P2" draw:layer="layout" svg:width="2.016cm" svg:height="1.872cm" svg:x="12.464cm" svg:y="24.611cm">
          <draw:image xlink:href="Pictures/100006D000000A7000000D0660D37332.svg" xlink:type="simple" xlink:show="embed" xlink:actuate="onLoad" draw:mime-type="image/svg+xml">
            <text:p/>
          </draw:image>
          <draw:image xlink:href="Pictures/10000001000000650000007EEFA02AAB.png" xlink:type="simple" xlink:show="embed" xlink:actuate="onLoad" draw:mime-type="image/png"/>
        </draw:frame>
        <draw:frame draw:style-name="gr5" draw:text-style-name="P2" draw:layer="layout" svg:width="2.016cm" svg:height="1.872cm" svg:x="14.47cm" svg:y="24.611cm">
          <draw:image xlink:href="Pictures/1000070000000A7000000D06F9745173.svg" xlink:type="simple" xlink:show="embed" xlink:actuate="onLoad" draw:mime-type="image/svg+xml">
            <text:p/>
          </draw:image>
          <draw:image xlink:href="Pictures/10000001000000650000007E3BA6803A.png" xlink:type="simple" xlink:show="embed" xlink:actuate="onLoad" draw:mime-type="image/png"/>
        </draw:frame>
        <draw:frame draw:style-name="gr40" draw:text-style-name="P4" draw:layer="layout" svg:width="6.022cm" svg:height="18.295cm" svg:x="22.283cm" svg:y="2.867cm">
          <draw:text-box>
            <text:p text:style-name="P4">├── adventure</text:p>
            <text:p text:style-name="P4">│   ├── cleanup</text:p>
            <text:p text:style-name="P4">│   ├── combat</text:p>
            <text:p text:style-name="P4">│   ├── delve</text:p>
            <text:p text:style-name="P4">│   ├── mapping</text:p>
            <text:p text:style-name="P4">│   ├── minigames</text:p>
            <text:p text:style-name="P4">│   ├── roles</text:p>
            <text:p text:style-name="P4">│   ├── saves</text:p>
            <text:p text:style-name="P4">│   └── travel</text:p>
            <text:p text:style-name="P4">├── character</text:p>
            <text:p text:style-name="P4">│   ├── class</text:p>
            <text:p text:style-name="P4">│   ├── creation</text:p>
            <text:p text:style-name="P4">│   ├── hirelings</text:p>
            <text:p text:style-name="P4">│   ├── items</text:p>
            <text:p text:style-name="P4">│   └── monsterous</text:p>
            <text:p text:style-name="P4">├── downtime</text:p>
            <text:p text:style-name="P4">│   ├── advanced</text:p>
            <text:p text:style-name="P4">│   ├── basic</text:p>
            <text:p text:style-name="P4">│   └── npc</text:p>
            <text:p text:style-name="P4">├── magic</text:p>
            <text:p text:style-name="P4">│   ├── magic</text:p>
            <text:p text:style-name="P4">│   ├── spells</text:p>
            <text:p text:style-name="P4">├── resources</text:p>
            <text:p text:style-name="P4">│   ├── complete</text:p>
            <text:p text:style-name="P4">│  <text:s/>├── summary</text:p>
            <text:p text:style-name="P4">│   ├── updates</text:p>
            <text:p text:style-name="P4">│   └── yabec3-0</text:p>
            <text:p text:style-name="P4">└── additional notes </text:p>
          </draw:text-box>
        </draw:frame>
        <draw:frame draw:style-name="gr41" draw:text-style-name="P7" draw:layer="layout" svg:width="3.492cm" svg:height="3.492cm" svg:x="15.605cm" svg:y="20.367cm">
          <draw:image xlink:href="Pictures/100000010000008400000084C74DC7A2.gif" xlink:type="simple" xlink:show="embed" xlink:actuate="onLoad" draw:mime-type="image/gif">
            <text:p/>
          </draw:image>
        </draw:frame>
        <draw:frame draw:style-name="gr42" draw:layer="layout" svg:width="3.534cm" svg:height="0.956cm" svg:x="15.735cm" svg:y="23.856cm">
          <draw:text-box>
            <text:p>View the rules online at </text:p>
            <text:p>adambeck.github.io/yabec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ommodore 64" svg:font-family="'Commodore 64'" style:font-adornments="Regular" style:font-pitch="variable" style:font-charset="x-symbol"/>
    <style:font-face style:name="FreeSans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Adwaita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style:font-name="Commodore 64" fo:font-family="'Commodore 64'" style:font-style-name="Regular" style:font-pitch="variable" style:font-charset="x-symbol" fo:font-size="24pt"/>
    </style:style>
    <style:style style:name="Heading_20_A4" style:display-name="Heading A4" style:family="graphic" style:parent-style-name="A4">
      <style:graphic-properties draw:stroke="none"/>
      <style:text-properties style:font-name="Liberation Sans" fo:font-family="'Liberation Sans'" style:font-style-name="Bold" style:font-family-generic="swiss" style:font-pitch="variable" fo:font-size="14pt" style:text-underline-style="solid" style:text-underline-width="bold" style:text-underline-color="font-color" fo:font-weight="bold"/>
    </style:style>
    <style:style style:name="Text_20_A4" style:display-name="Text A4" style:family="graphic" style:parent-style-name="A4">
      <style:graphic-properties draw:stroke="none"/>
      <style:text-properties style:font-name="Liberation Sans2" fo:font-family="'Liberation Sans'" style:font-style-name="Regular" style:font-family-generic="swiss" style:font-pitch="variable" fo:font-size="14pt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te" style:family="graphic" style:parent-style-name="A4">
      <style:text-properties fo:font-size="8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9T13:44:09.627728025</meta:creation-date>
    <dc:date>2026-07-08T14:59:36.130566347</dc:date>
    <meta:editing-duration>PT1H15M51S</meta:editing-duration>
    <meta:editing-cycles>14</meta:editing-cycles>
    <meta:generator>LibreOffice/25.8.7.3$Linux_X86_64 LibreOffice_project/580$Build-3</meta:generator>
    <meta:print-date>2026-04-29T15:08:27.486306989</meta:print-date>
    <meta:printed-by>PDF files</meta:printed-by>
    <meta:document-statistic meta:object-count="59"/>
  </office:meta>
</office:document-meta>
</file>